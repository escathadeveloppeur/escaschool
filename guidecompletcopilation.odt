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2.39cm" table:align="left"/>
    </style:style>
    <style:style style:name="Tableau1.A" style:family="table-column">
      <style:table-column-properties style:column-width="2.247cm"/>
    </style:style>
    <style:style style:name="Tableau1.B" style:family="table-column">
      <style:table-column-properties style:column-width="10.14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7"/>
    <style:style style:name="P3" style:family="paragraph" style:parent-style-name="Text_20_body" style:list-style-name="L8"/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📚 GUIDE DE COMPILATION - ECOLE APP</text:h>
      <text:h text:style-name="Heading_20_2" text:outline-level="2">Table des matières</text:h>
      <text:list xml:id="list912707821" text:style-name="L7">
        <text:list-item>
          <text:p text:style-name="P2">Prérequis</text:p>
        </text:list-item>
        <text:list-item>
          <text:p text:style-name="P2">Compilation Windows</text:p>
        </text:list-item>
        <text:list-item>
          <text:p text:style-name="P2">Compilation iOS</text:p>
        </text:list-item>
        <text:list-item>
          <text:p text:style-name="P2">Téléchargement des fichiers</text:p>
        </text:list-item>
        <text:list-item>
          <text:p text:style-name="P2">Mise à jour de la page web</text:p>
        </text:list-item>
        <text:list-item>
          <text:p text:style-name="P2">Publication sur GitHub Releases</text:p>
        </text:list-item>
        <text:list-item>
          <text:p text:style-name="P2">Dépannage</text:p>
        </text:list-item>
      </text:list>
      <text:p text:style-name="Horizontal_20_Line"/>
      <text:h text:style-name="Heading_20_2" text:outline-level="2">📋 PRÉREQUIS</text:h>
      <text:h text:style-name="Heading_20_3" text:outline-level="3">Sur ta machine (Ubuntu) :</text:h>
      <text:p text:style-name="Text_20_body">bash</text:p>
      <text:p text:style-name="Preformatted_20_Text"># 1. Vérifier que tout est à jour</text:p>
      <text:p text:style-name="Preformatted_20_Text">cd ~/projets/ecole_app</text:p>
      <text:p text:style-name="Preformatted_20_Text"/>
      <text:p text:style-name="Preformatted_20_Text"># 2. Nettoyer le projet</text:p>
      <text:p text:style-name="Preformatted_20_Text">flutter clean</text:p>
      <text:p text:style-name="Preformatted_20_Text"/>
      <text:p text:style-name="Preformatted_20_Text"># 3. Récupérer les dépendances</text:p>
      <text:p text:style-name="Preformatted_20_Text">flutter pub get</text:p>
      <text:p text:style-name="Preformatted_20_Text"/>
      <text:p text:style-name="Preformatted_20_Text"># 4. Générer les fichiers Hive (si modèles modifiés)</text:p>
      <text:p text:style-name="P1">flutter pub run build_runner build --delete-conflicting-outputs</text:p>
      <text:h text:style-name="Heading_20_3" text:outline-level="3">Sur GitHub :</text:h>
      <text:list xml:id="list1610340287" text:style-name="L8">
        <text:list-item>
          <text:p text:style-name="P3">Dépôt : <text:a xlink:type="simple" xlink:href="https://github.com/escathadeveloppeur/escaschool" office:target-frame-name="_blank" xlink:show="new" text:style-name="Internet_20_link" text:visited-style-name="Visited_20_Internet_20_Link">https://github.com/escathadeveloppeur/escaschool</text:a></text:p>
        </text:list-item>
        <text:list-item>
          <text:p text:style-name="P3">Branche : <text:span text:style-name="Source_20_Text">main</text:span></text:p>
        </text:list-item>
      </text:list>
      <text:p text:style-name="Horizontal_20_Line"/>
      <text:h text:style-name="Heading_20_2" text:outline-level="2">🪟 1. COMPILATION WINDOWS</text:h>
      <text:h text:style-name="Heading_20_3" text:outline-level="3">Étape 1 : Créer le fichier de workflow</text:h>
      <text:p text:style-name="Text_20_body">bash</text:p>
      <text:p text:style-name="Preformatted_20_Text"># Créer le dossier s'il n'existe pas</text:p>
      <text:p text:style-name="Preformatted_20_Text">mkdir -p .github/workflows</text:p>
      <text:p text:style-name="Preformatted_20_Text"><text:soft-page-break/></text:p>
      <text:p text:style-name="Preformatted_20_Text"># Créer le fichier</text:p>
      <text:p text:style-name="P1">nano .github/workflows/build_windows.yml</text:p>
      <text:h text:style-name="Heading_20_3" text:outline-level="3">Étape 2 : Copier ce contenu</text:h>
      <text:p text:style-name="Text_20_body">yaml</text:p>
      <text:p text:style-name="Preformatted_20_Text">name: Build Windows App</text:p>
      <text:p text:style-name="Preformatted_20_Text"/>
      <text:p text:style-name="Preformatted_20_Text">on:</text:p>
      <text:p text:style-name="Preformatted_20_Text"><text:s text:c="2"/>push:</text:p>
      <text:p text:style-name="Preformatted_20_Text"><text:s text:c="4"/>branches: [ main, master ]</text:p>
      <text:p text:style-name="Preformatted_20_Text"><text:s text:c="2"/>workflow_dispatch:</text:p>
      <text:p text:style-name="Preformatted_20_Text"/>
      <text:p text:style-name="Preformatted_20_Text">jobs:</text:p>
      <text:p text:style-name="Preformatted_20_Text"><text:s text:c="2"/>build-windows:</text:p>
      <text:p text:style-name="Preformatted_20_Text"><text:s text:c="4"/>runs-on: windows-latest</text:p>
      <text:p text:style-name="Preformatted_20_Text"><text:s text:c="4"/></text:p>
      <text:p text:style-name="Preformatted_20_Text"><text:s text:c="4"/>steps:</text:p>
      <text:p text:style-name="Preformatted_20_Text"><text:s text:c="4"/>- uses: actions/checkout@v4</text:p>
      <text:p text:style-name="Preformatted_20_Text"><text:s text:c="4"/></text:p>
      <text:p text:style-name="Preformatted_20_Text"><text:s text:c="4"/>- uses: subosito/flutter-action@v2</text:p>
      <text:p text:style-name="Preformatted_20_Text"><text:s text:c="6"/>with:</text:p>
      <text:p text:style-name="Preformatted_20_Text"><text:s text:c="8"/>flutter-version: '3.22.0'</text:p>
      <text:p text:style-name="Preformatted_20_Text"><text:s text:c="8"/>channel: 'stable'</text:p>
      <text:p text:style-name="Preformatted_20_Text"><text:s text:c="4"/></text:p>
      <text:p text:style-name="Preformatted_20_Text"><text:s text:c="4"/>- name: Enable Windows desktop</text:p>
      <text:p text:style-name="Preformatted_20_Text"><text:s text:c="6"/>run: flutter config --enable-windows-desktop</text:p>
      <text:p text:style-name="Preformatted_20_Text"><text:s text:c="4"/></text:p>
      <text:p text:style-name="Preformatted_20_Text"><text:s text:c="4"/>- name: Clean project</text:p>
      <text:p text:style-name="Preformatted_20_Text"><text:s text:c="6"/>run: flutter clean</text:p>
      <text:p text:style-name="Preformatted_20_Text"><text:s text:c="4"/></text:p>
      <text:p text:style-name="Preformatted_20_Text"><text:s text:c="4"/>- name: Get dependencies</text:p>
      <text:p text:style-name="Preformatted_20_Text"><text:s text:c="6"/>run: flutter pub get</text:p>
      <text:p text:style-name="Preformatted_20_Text"><text:s text:c="4"/></text:p>
      <text:p text:style-name="Preformatted_20_Text"><text:s text:c="4"/>- name: Build Windows app</text:p>
      <text:p text:style-name="Preformatted_20_Text"><text:s text:c="6"/>run: flutter build windows --release</text:p>
      <text:p text:style-name="Preformatted_20_Text"><text:s text:c="4"/></text:p>
      <text:p text:style-name="Preformatted_20_Text"><text:s text:c="4"/>- name: Create ZIP of Release folder</text:p>
      <text:p text:style-name="Preformatted_20_Text"><text:s text:c="6"/>run: |</text:p>
      <text:p text:style-name="Preformatted_20_Text"><text:s text:c="8"/>cd build/windows/runner/Release</text:p>
      <text:p text:style-name="Preformatted_20_Text"><text:s text:c="8"/>Compress-Archive -Path * -DestinationPath EcoleApp-Windows.zip</text:p>
      <text:p text:style-name="Preformatted_20_Text"><text:s text:c="4"/></text:p>
      <text:p text:style-name="Preformatted_20_Text"><text:s text:c="4"/>- name: Upload Windows build</text:p>
      <text:p text:style-name="Preformatted_20_Text"><text:s text:c="6"/>uses: actions/upload-artifact@v4</text:p>
      <text:p text:style-name="Preformatted_20_Text"><text:s text:c="6"/>with:</text:p>
      <text:p text:style-name="Preformatted_20_Text"><text:s text:c="8"/>name: EcoleApp-Windows</text:p>
      <text:p text:style-name="P1"><text:s text:c="8"/>path: build/windows/runner/Release/EcoleApp-Windows.zip</text:p>
      <text:h text:style-name="Heading_20_3" text:outline-level="3">Étape 3 : Pousser sur GitHub</text:h>
      <text:p text:style-name="Text_20_body">bash</text:p>
      <text:p text:style-name="Preformatted_20_Text">git add .github/workflows/build_windows.yml</text:p>
      <text:p text:style-name="Preformatted_20_Text">git commit -m "Ajout compilation Windows"</text:p>
      <text:p text:style-name="P1">git push origin main</text:p>
      <text:h text:style-name="Heading_20_3" text:outline-level="3">Étape 4 : Télécharger le fichier</text:h>
      <text:list xml:id="list1047172064" text:style-name="L9">
        <text:list-item>
          <text:p text:style-name="P4">Aller sur <text:a xlink:type="simple" xlink:href="https://github.com/escathadeveloppeur/escaschool/actions" office:target-frame-name="_blank" xlink:show="new" text:style-name="Internet_20_link" text:visited-style-name="Visited_20_Internet_20_Link"><text:span text:style-name="Strong_20_Emphasis">https://github.com/escathadeveloppeur/escaschool/actions</text:span></text:a></text:p>
        </text:list-item>
        <text:list-item>
          <text:p text:style-name="P4"><text:soft-page-break/>Cliquer sur <text:span text:style-name="Strong_20_Emphasis">"Build Windows App"</text:span></text:p>
        </text:list-item>
        <text:list-item>
          <text:p text:style-name="P4">Attendre la fin (5-10 min)</text:p>
        </text:list-item>
        <text:list-item>
          <text:p text:style-name="P4">Scroller en bas → <text:span text:style-name="Strong_20_Emphasis">Artifacts</text:span> → <text:span text:style-name="Strong_20_Emphasis">Télécharger "EcoleApp-Windows"</text:span></text:p>
        </text:list-item>
      </text:list>
      <text:h text:style-name="Heading_20_3" text:outline-level="3">Étape 5 : Mettre à jour la release</text:h>
      <text:list xml:id="list3729417584" text:style-name="L10">
        <text:list-item>
          <text:p text:style-name="P5">Aller sur <text:a xlink:type="simple" xlink:href="https://github.com/escathadeveloppeur/escaschool/releases" office:target-frame-name="_blank" xlink:show="new" text:style-name="Internet_20_link" text:visited-style-name="Visited_20_Internet_20_Link"><text:span text:style-name="Strong_20_Emphasis">https://github.com/escathadeveloppeur/escaschool/releases</text:span></text:a></text:p>
        </text:list-item>
        <text:list-item>
          <text:p text:style-name="P5">Cliquer sur <text:span text:style-name="Strong_20_Emphasis">"Edit"</text:span> à côté de v1.0.0</text:p>
        </text:list-item>
        <text:list-item>
          <text:p text:style-name="P5">Supprimer l'ancien fichier si besoin</text:p>
        </text:list-item>
        <text:list-item>
          <text:p text:style-name="P5">Uploader <text:span text:style-name="Source_20_Text">EcoleApp-Windows.zip</text:span></text:p>
        </text:list-item>
        <text:list-item>
          <text:p text:style-name="P5">Cliquer sur <text:span text:style-name="Strong_20_Emphasis">"Update release"</text:span></text:p>
        </text:list-item>
      </text:list>
      <text:p text:style-name="Horizontal_20_Line"/>
      <text:h text:style-name="Heading_20_2" text:outline-level="2">📱 2. COMPILATION iOS</text:h>
      <text:h text:style-name="Heading_20_3" text:outline-level="3">Étape 1 : Créer le fichier de workflow</text:h>
      <text:p text:style-name="Text_20_body">bash</text:p>
      <text:p text:style-name="P1">nano .github/workflows/build_ios.yml</text:p>
      <text:h text:style-name="Heading_20_3" text:outline-level="3">Étape 2 : Copier ce contenu</text:h>
      <text:p text:style-name="Text_20_body">yaml</text:p>
      <text:p text:style-name="Preformatted_20_Text">name: Build iOS App</text:p>
      <text:p text:style-name="Preformatted_20_Text"/>
      <text:p text:style-name="Preformatted_20_Text">on:</text:p>
      <text:p text:style-name="Preformatted_20_Text"><text:s text:c="2"/>push:</text:p>
      <text:p text:style-name="Preformatted_20_Text"><text:s text:c="4"/>branches: [ main, master ]</text:p>
      <text:p text:style-name="Preformatted_20_Text"><text:s text:c="2"/>workflow_dispatch:</text:p>
      <text:p text:style-name="Preformatted_20_Text"/>
      <text:p text:style-name="Preformatted_20_Text">jobs:</text:p>
      <text:p text:style-name="Preformatted_20_Text"><text:s text:c="2"/>build-ios:</text:p>
      <text:p text:style-name="Preformatted_20_Text"><text:s text:c="4"/>runs-on: macos-latest</text:p>
      <text:p text:style-name="Preformatted_20_Text"><text:s text:c="4"/></text:p>
      <text:p text:style-name="Preformatted_20_Text"><text:s text:c="4"/>steps:</text:p>
      <text:p text:style-name="Preformatted_20_Text"><text:s text:c="4"/>- uses: actions/checkout@v4</text:p>
      <text:p text:style-name="Preformatted_20_Text"><text:s text:c="4"/></text:p>
      <text:p text:style-name="Preformatted_20_Text"><text:s text:c="4"/>- uses: subosito/flutter-action@v2</text:p>
      <text:p text:style-name="Preformatted_20_Text"><text:s text:c="6"/>with:</text:p>
      <text:p text:style-name="Preformatted_20_Text"><text:s text:c="8"/>flutter-version: '3.22.0'</text:p>
      <text:p text:style-name="Preformatted_20_Text"><text:s text:c="8"/>channel: 'stable'</text:p>
      <text:p text:style-name="Preformatted_20_Text"><text:s text:c="4"/></text:p>
      <text:p text:style-name="Preformatted_20_Text"><text:s text:c="4"/>- name: Install CocoaPods</text:p>
      <text:p text:style-name="Preformatted_20_Text"><text:s text:c="6"/>run: |</text:p>
      <text:p text:style-name="Preformatted_20_Text"><text:s text:c="8"/>cd ios</text:p>
      <text:p text:style-name="Preformatted_20_Text"><text:s text:c="8"/>pod install</text:p>
      <text:p text:style-name="Preformatted_20_Text"><text:s text:c="4"/></text:p>
      <text:p text:style-name="Preformatted_20_Text"><text:s text:c="4"/>- name: Build iOS</text:p>
      <text:p text:style-name="Preformatted_20_Text"><text:s text:c="6"/>run: flutter build ios --release --no-codesign</text:p>
      <text:p text:style-name="Preformatted_20_Text"><text:s text:c="4"/></text:p>
      <text:p text:style-name="Preformatted_20_Text"><text:s text:c="4"/>- name: Create IPA</text:p>
      <text:p text:style-name="Preformatted_20_Text"><text:soft-page-break/><text:s text:c="6"/>run: |</text:p>
      <text:p text:style-name="Preformatted_20_Text"><text:s text:c="8"/>mkdir -p build/ios/ipa/Payload</text:p>
      <text:p text:style-name="Preformatted_20_Text"><text:s text:c="8"/>cp -r build/ios/iphoneos/Runner.app build/ios/ipa/Payload/</text:p>
      <text:p text:style-name="Preformatted_20_Text"><text:s text:c="8"/>cd build/ios/ipa</text:p>
      <text:p text:style-name="Preformatted_20_Text"><text:s text:c="8"/>zip -r EcoleApp-iOS.ipa Payload/</text:p>
      <text:p text:style-name="Preformatted_20_Text"><text:s text:c="4"/></text:p>
      <text:p text:style-name="Preformatted_20_Text"><text:s text:c="4"/>- name: Upload iOS build</text:p>
      <text:p text:style-name="Preformatted_20_Text"><text:s text:c="6"/>uses: actions/upload-artifact@v4</text:p>
      <text:p text:style-name="Preformatted_20_Text"><text:s text:c="6"/>with:</text:p>
      <text:p text:style-name="Preformatted_20_Text"><text:s text:c="8"/>name: EcoleApp-iOS</text:p>
      <text:p text:style-name="P1"><text:s text:c="8"/>path: build/ios/ipa/EcoleApp-iOS.ipa</text:p>
      <text:h text:style-name="Heading_20_3" text:outline-level="3">Étape 3 : Pousser sur GitHub</text:h>
      <text:p text:style-name="Text_20_body">bash</text:p>
      <text:p text:style-name="Preformatted_20_Text">git add .github/workflows/build_ios.yml</text:p>
      <text:p text:style-name="Preformatted_20_Text">git commit -m "Ajout compilation iOS"</text:p>
      <text:p text:style-name="P1">git push origin main</text:p>
      <text:h text:style-name="Heading_20_3" text:outline-level="3">Étape 4 : Télécharger le fichier</text:h>
      <text:list xml:id="list3293468230" text:style-name="L11">
        <text:list-item>
          <text:p text:style-name="P6">Aller sur <text:a xlink:type="simple" xlink:href="https://github.com/escathadeveloppeur/escaschool/actions" office:target-frame-name="_blank" xlink:show="new" text:style-name="Internet_20_link" text:visited-style-name="Visited_20_Internet_20_Link"><text:span text:style-name="Strong_20_Emphasis">https://github.com/escathadeveloppeur/escaschool/actions</text:span></text:a></text:p>
        </text:list-item>
        <text:list-item>
          <text:p text:style-name="P6">Cliquer sur <text:span text:style-name="Strong_20_Emphasis">"Build iOS App"</text:span></text:p>
        </text:list-item>
        <text:list-item>
          <text:p text:style-name="P6">Attendre la fin (10-15 min)</text:p>
        </text:list-item>
        <text:list-item>
          <text:p text:style-name="P6">Scroller en bas → <text:span text:style-name="Strong_20_Emphasis">Artifacts</text:span> → <text:span text:style-name="Strong_20_Emphasis">Télécharger "EcoleApp-iOS"</text:span></text:p>
        </text:list-item>
      </text:list>
      <text:p text:style-name="Horizontal_20_Line"/>
      <text:h text:style-name="Heading_20_2" text:outline-level="2">📥 3. TÉLÉCHARGEMENT DES FICHIERS</text:h>
      <text:h text:style-name="Heading_20_3" text:outline-level="3">Depuis GitHub Actions</text:h>
      <text:p text:style-name="Text_20_body">bash</text:p>
      <text:p text:style-name="Preformatted_20_Text"># Lien direct</text:p>
      <text:p text:style-name="Preformatted_20_Text">https://github.com/escathadeveloppeur/escaschool/actions</text:p>
      <text:p text:style-name="Preformatted_20_Text"/>
      <text:p text:style-name="Preformatted_20_Text"># 1. Choisir le workflow (Windows ou iOS)</text:p>
      <text:p text:style-name="Preformatted_20_Text"># 2. Cliquer sur le dernier run réussi</text:p>
      <text:p text:style-name="Preformatted_20_Text"># 3. Scroller en bas</text:p>
      <text:p text:style-name="P1"># 4. Télécharger l'artifact</text:p>
      <text:h text:style-name="Heading_20_3" text:outline-level="3">Depuis GitHub Releases</text:h>
      <text:p text:style-name="Text_20_body">bash</text:p>
      <text:p text:style-name="Preformatted_20_Text"># Lien direct</text:p>
      <text:p text:style-name="Preformatted_20_Text">https://github.com/escathadeveloppeur/escaschool/releases</text:p>
      <text:p text:style-name="Preformatted_20_Text"/>
      <text:p text:style-name="Preformatted_20_Text"># Télécharger les fichiers :</text:p>
      <text:p text:style-name="Preformatted_20_Text"># - EcoleApp-Windows.zip (Windows)</text:p>
      <text:p text:style-name="Preformatted_20_Text"># - EcoleApp-iOS.ipa (iOS)</text:p>
      <text:p text:style-name="P1"># - app-release.apk (Android)</text:p>
      <text:p text:style-name="Horizontal_20_Line"/>
      <text:h text:style-name="Heading_20_2" text:outline-level="2"><text:soft-page-break/>🌐 4. MISE À JOUR DE LA PAGE WEB</text:h>
      <text:h text:style-name="Heading_20_3" text:outline-level="3">Fichier : <text:span text:style-name="Source_20_Text">docs/index.html</text:span></text:h>
      <text:p text:style-name="Text_20_body">bash</text:p>
      <text:p text:style-name="Preformatted_20_Text"># Ouvrir le fichier</text:p>
      <text:p text:style-name="P1">nano docs/index.html</text:p>
      <text:h text:style-name="Heading_20_3" text:outline-level="3">Structure à respecter :</text:h>
      <text:p text:style-name="Text_20_body">html</text:p>
      <text:p text:style-name="Preformatted_20_Text">&lt;!-- Téléchargements --&gt;</text:p>
      <text:p text:style-name="Preformatted_20_Text">&lt;div class="download-grid"&gt;</text:p>
      <text:p text:style-name="Preformatted_20_Text"><text:s text:c="4"/></text:p>
      <text:p text:style-name="Preformatted_20_Text"><text:s text:c="4"/>&lt;!-- Windows --&gt;</text:p>
      <text:p text:style-name="Preformatted_20_Text"><text:s text:c="4"/>&lt;a href="https://github.com/escathadeveloppeur/escaschool/releases/download/v1.0.0/EcoleApp-Windows.zip"</text:p>
      <text:p text:style-name="Preformatted_20_Text"><text:s text:c="7"/>class="download-btn windows" download&gt;</text:p>
      <text:p text:style-name="Preformatted_20_Text"><text:s text:c="8"/>&lt;span class="icon"&gt;🖥️&lt;/span&gt;</text:p>
      <text:p text:style-name="Preformatted_20_Text"><text:s text:c="8"/>&lt;span class="info"&gt;</text:p>
      <text:p text:style-name="Preformatted_20_Text"><text:s text:c="12"/>&lt;span class="label"&gt;Windows (ZIP complet)&lt;/span&gt;</text:p>
      <text:p text:style-name="Preformatted_20_Text"><text:s text:c="12"/>&lt;span class="sub"&gt;📦 ZIP à extraire • Windows 10 / 11&lt;/span&gt;</text:p>
      <text:p text:style-name="Preformatted_20_Text"><text:s text:c="8"/>&lt;/span&gt;</text:p>
      <text:p text:style-name="Preformatted_20_Text"><text:s text:c="8"/>&lt;span class="arrow"&gt;→&lt;/span&gt;</text:p>
      <text:p text:style-name="Preformatted_20_Text"><text:s text:c="4"/>&lt;/a&gt;</text:p>
      <text:p text:style-name="Preformatted_20_Text"><text:s text:c="4"/></text:p>
      <text:p text:style-name="Preformatted_20_Text"><text:s text:c="4"/>&lt;!-- Android --&gt;</text:p>
      <text:p text:style-name="Preformatted_20_Text"><text:s text:c="4"/>&lt;a href="https://github.com/escathadeveloppeur/escaschool/releases/download/v1.0.0/app-release.apk"</text:p>
      <text:p text:style-name="Preformatted_20_Text"><text:s text:c="7"/>class="download-btn android" download&gt;</text:p>
      <text:p text:style-name="Preformatted_20_Text"><text:s text:c="8"/>&lt;span class="icon"&gt;📱&lt;/span&gt;</text:p>
      <text:p text:style-name="Preformatted_20_Text"><text:s text:c="8"/>&lt;span class="info"&gt;</text:p>
      <text:p text:style-name="Preformatted_20_Text"><text:s text:c="12"/>&lt;span class="label"&gt;Android&lt;/span&gt;</text:p>
      <text:p text:style-name="Preformatted_20_Text"><text:s text:c="12"/>&lt;span class="sub"&gt;.apk • 84 MB • Android 5.0+&lt;/span&gt;</text:p>
      <text:p text:style-name="Preformatted_20_Text"><text:s text:c="8"/>&lt;/span&gt;</text:p>
      <text:p text:style-name="Preformatted_20_Text"><text:s text:c="8"/>&lt;span class="arrow"&gt;→&lt;/span&gt;</text:p>
      <text:p text:style-name="Preformatted_20_Text"><text:s text:c="4"/>&lt;/a&gt;</text:p>
      <text:p text:style-name="Preformatted_20_Text"><text:s text:c="4"/></text:p>
      <text:p text:style-name="Preformatted_20_Text"><text:s text:c="4"/>&lt;!-- iOS --&gt;</text:p>
      <text:p text:style-name="Preformatted_20_Text"><text:s text:c="4"/>&lt;a href="https://github.com/escathadeveloppeur/escaschool/releases/download/v1.0.0/EcoleApp-iOS.ipa"</text:p>
      <text:p text:style-name="Preformatted_20_Text"><text:s text:c="7"/>class="download-btn ios" download&gt;</text:p>
      <text:p text:style-name="Preformatted_20_Text"><text:s text:c="8"/>&lt;span class="icon"&gt;🍎&lt;/span&gt;</text:p>
      <text:p text:style-name="Preformatted_20_Text"><text:s text:c="8"/>&lt;span class="info"&gt;</text:p>
      <text:p text:style-name="Preformatted_20_Text"><text:s text:c="12"/>&lt;span class="label"&gt;iOS (TestFlight)&lt;/span&gt;</text:p>
      <text:p text:style-name="Preformatted_20_Text"><text:s text:c="12"/>&lt;span class="sub"&gt;.ipa • iOS 12.0+&lt;/span&gt;</text:p>
      <text:p text:style-name="Preformatted_20_Text"><text:s text:c="8"/>&lt;/span&gt;</text:p>
      <text:p text:style-name="Preformatted_20_Text"><text:s text:c="8"/>&lt;span class="arrow"&gt;→&lt;/span&gt;</text:p>
      <text:p text:style-name="Preformatted_20_Text"><text:s text:c="4"/>&lt;/a&gt;</text:p>
      <text:p text:style-name="Preformatted_20_Text"><text:s text:c="4"/></text:p>
      <text:p text:style-name="Preformatted_20_Text">&lt;/div&gt;</text:p>
      <text:p text:style-name="Preformatted_20_Text"/>
      <text:p text:style-name="Preformatted_20_Text">&lt;!-- Visual C++ Redistributable --&gt;</text:p>
      <text:p text:style-name="Preformatted_20_Text">&lt;a href="https://aka.ms/vs/17/release/vc_redist.x64.exe"</text:p>
      <text:p text:style-name="Preformatted_20_Text"><text:s text:c="3"/>class="redist-btn" target="_blank"&gt;</text:p>
      <text:p text:style-name="Preformatted_20_Text"><text:s text:c="4"/>&lt;span class="icon"&gt;⚙️&lt;/span&gt;</text:p>
      <text:p text:style-name="Preformatted_20_Text"><text:s text:c="4"/>&lt;span class="info"&gt;</text:p>
      <text:p text:style-name="Preformatted_20_Text"><text:soft-page-break/><text:s text:c="8"/>&lt;span class="label"&gt;Visual C++ Redistributable&lt;/span&gt;</text:p>
      <text:p text:style-name="Preformatted_20_Text"><text:s text:c="8"/>&lt;span class="sub"&gt;Nécessaire pour lancer l'application Windows&lt;/span&gt;</text:p>
      <text:p text:style-name="Preformatted_20_Text"><text:s text:c="4"/>&lt;/span&gt;</text:p>
      <text:p text:style-name="Preformatted_20_Text"><text:s text:c="4"/>&lt;span class="arrow"&gt;→&lt;/span&gt;</text:p>
      <text:p text:style-name="P1">&lt;/a&gt;</text:p>
      <text:h text:style-name="Heading_20_3" text:outline-level="3">Pousser la mise à jour :</text:h>
      <text:p text:style-name="Text_20_body">bash</text:p>
      <text:p text:style-name="Preformatted_20_Text">git add docs/index.html</text:p>
      <text:p text:style-name="Preformatted_20_Text">git commit -m "Mise à jour page de téléchargement"</text:p>
      <text:p text:style-name="P1">git push origin main</text:p>
      <text:h text:style-name="Heading_20_3" text:outline-level="3">Vérifier en ligne :</text:h>
      <text:p text:style-name="Text_20_body">bash</text:p>
      <text:p text:style-name="P1">https://escathadeveloppeur.github.io/escaschool/</text:p>
      <text:p text:style-name="Horizontal_20_Line"/>
      <text:h text:style-name="Heading_20_2" text:outline-level="2">📦 5. PUBLICATION SUR GITHUB RELEASES</text:h>
      <text:h text:style-name="Heading_20_3" text:outline-level="3">Créer une nouvelle release</text:h>
      <text:p text:style-name="Text_20_body">bash</text:p>
      <text:p text:style-name="Preformatted_20_Text"># 1. Aller sur</text:p>
      <text:p text:style-name="Preformatted_20_Text">https://github.com/escathadeveloppeur/escaschool/releases</text:p>
      <text:p text:style-name="Preformatted_20_Text"/>
      <text:p text:style-name="Preformatted_20_Text"># 2. Cliquer sur "Draft a new release"</text:p>
      <text:p text:style-name="Preformatted_20_Text"># 3. Tag : v1.0.0 (ou v1.0.1, v1.1.0, etc.)</text:p>
      <text:p text:style-name="Preformatted_20_Text"># 4. Titre : Version 1.0.0</text:p>
      <text:p text:style-name="Preformatted_20_Text"># 5. Uploader les fichiers :</text:p>
      <text:p text:style-name="Preformatted_20_Text"># <text:s text:c="3"/>- EcoleApp-Windows.zip</text:p>
      <text:p text:style-name="Preformatted_20_Text"># <text:s text:c="3"/>- EcoleApp-iOS.ipa</text:p>
      <text:p text:style-name="Preformatted_20_Text"># <text:s text:c="3"/>- app-release.apk</text:p>
      <text:p text:style-name="P1"># 6. Cliquer sur "Publish release"</text:p>
      <text:h text:style-name="Heading_20_3" text:outline-level="3">Exemple de description :</text:h>
      <text:p text:style-name="Text_20_body">markdown</text:p>
      <text:p text:style-name="Preformatted_20_Text"># 📚 Ecole App v1.0.0</text:p>
      <text:p text:style-name="Preformatted_20_Text"/>
      <text:p text:style-name="Preformatted_20_Text">Application de gestion scolaire complète.</text:p>
      <text:p text:style-name="Preformatted_20_Text"/>
      <text:p text:style-name="Preformatted_20_Text">## 📦 Téléchargements</text:p>
      <text:p text:style-name="Preformatted_20_Text"/>
      <text:p text:style-name="Preformatted_20_Text">| Plateforme | Fichier | Taille |</text:p>
      <text:p text:style-name="Preformatted_20_Text">|------------|---------|--------|</text:p>
      <text:p text:style-name="Preformatted_20_Text">| 🪟 Windows | EcoleApp-Windows.zip | 150 MB |</text:p>
      <text:p text:style-name="Preformatted_20_Text">| 🍎 iOS | EcoleApp-iOS.ipa | 80 MB |</text:p>
      <text:p text:style-name="Preformatted_20_Text">| 📱 Android | app-release.apk | 84 MB |</text:p>
      <text:p text:style-name="Preformatted_20_Text"/>
      <text:p text:style-name="Preformatted_20_Text">## 🔧 Installation</text:p>
      <text:p text:style-name="Preformatted_20_Text"/>
      <text:p text:style-name="Preformatted_20_Text">**Windows :**</text:p>
      <text:p text:style-name="Preformatted_20_Text"><text:soft-page-break/>1. Télécharger le ZIP</text:p>
      <text:p text:style-name="Preformatted_20_Text">2. Extraire</text:p>
      <text:p text:style-name="Preformatted_20_Text">3. Double-cliquer sur ecole_app.exe</text:p>
      <text:p text:style-name="Preformatted_20_Text">4. Si erreur, installer Visual C++ Redistributable</text:p>
      <text:p text:style-name="Preformatted_20_Text"/>
      <text:p text:style-name="Preformatted_20_Text">**Android :**</text:p>
      <text:p text:style-name="Preformatted_20_Text">1. Télécharger l'APK</text:p>
      <text:p text:style-name="Preformatted_20_Text">2. Autoriser les sources inconnues</text:p>
      <text:p text:style-name="Preformatted_20_Text">3. Installer</text:p>
      <text:p text:style-name="Preformatted_20_Text"/>
      <text:p text:style-name="Preformatted_20_Text">**iOS :**</text:p>
      <text:p text:style-name="Preformatted_20_Text">1. Télécharger l'IPA</text:p>
      <text:p text:style-name="P1">2. Installer via TestFlight ou SideStore</text:p>
      <text:p text:style-name="Horizontal_20_Line"/>
      <text:h text:style-name="Heading_20_2" text:outline-level="2">🔧 6. DÉPANNAGE</text:h>
      <text:h text:style-name="Heading_20_3" text:outline-level="3">Erreur : "vcruntime140_1.dll manquant"</text:h>
      <text:p text:style-name="Text_20_body"><text:span text:style-name="Strong_20_Emphasis">Solution :</text:span> L'utilisateur doit installer Visual C++ Redistributable</text:p>
      <text:p text:style-name="Text_20_body">bash</text:p>
      <text:p text:style-name="Preformatted_20_Text"># Lien direct</text:p>
      <text:p text:style-name="P1">https://aka.ms/vs/17/release/vc_redist.x64.exe</text:p>
      <text:h text:style-name="Heading_20_3" text:outline-level="3">Erreur : "flutter build windows" échoue</text:h>
      <text:p text:style-name="Text_20_body">bash</text:p>
      <text:p text:style-name="Preformatted_20_Text"># Vérifier la version de Flutter</text:p>
      <text:p text:style-name="Preformatted_20_Text">flutter --version</text:p>
      <text:p text:style-name="Preformatted_20_Text"/>
      <text:p text:style-name="Preformatted_20_Text"># Activer Windows desktop</text:p>
      <text:p text:style-name="Preformatted_20_Text">flutter config --enable-windows-desktop</text:p>
      <text:p text:style-name="Preformatted_20_Text"/>
      <text:p text:style-name="Preformatted_20_Text"># Nettoyer et recompiler</text:p>
      <text:p text:style-name="Preformatted_20_Text">flutter clean</text:p>
      <text:p text:style-name="Preformatted_20_Text">flutter pub get</text:p>
      <text:p text:style-name="P1">flutter build windows --release</text:p>
      <text:h text:style-name="Heading_20_3" text:outline-level="3">Erreur : GitHub Actions ne se lance pas</text:h>
      <text:p text:style-name="Text_20_body">bash</text:p>
      <text:p text:style-name="Preformatted_20_Text"># 1. Vérifier le fichier</text:p>
      <text:p text:style-name="Preformatted_20_Text">cat .github/workflows/build_windows.yml</text:p>
      <text:p text:style-name="Preformatted_20_Text"/>
      <text:p text:style-name="Preformatted_20_Text"># 2. Vérifier la branche</text:p>
      <text:p text:style-name="Preformatted_20_Text">git branch</text:p>
      <text:p text:style-name="Preformatted_20_Text"/>
      <text:p text:style-name="Preformatted_20_Text"># 3. Repousser avec un petit changement</text:p>
      <text:p text:style-name="Preformatted_20_Text">git commit --amend --no-edit</text:p>
      <text:p text:style-name="P1">git push --force origin main</text:p>
      <text:h text:style-name="Heading_20_3" text:outline-level="3">Erreur : Lien de téléchargement ne fonctionne pas</text:h>
      <text:p text:style-name="Text_20_body">bash</text:p>
      <text:p text:style-name="Preformatted_20_Text"><text:soft-page-break/># Vérifier le nom exact du fichier sur GitHub Releases</text:p>
      <text:p text:style-name="Preformatted_20_Text"># Le lien doit être :</text:p>
      <text:p text:style-name="P1">https://github.com/escathadeveloppeur/escaschool/releases/download/v1.0.0/NOM_EXACT_DU_FICHIER</text:p>
      <text:p text:style-name="Horizontal_20_Line"/>
      <text:h text:style-name="Heading_20_2" text:outline-level="2">📋 RÉSUMÉ DES COMMANDES RAPIDES</text:h>
      <text:h text:style-name="Heading_20_3" text:outline-level="3">Compilation Windows</text:h>
      <text:p text:style-name="Text_20_body">bash</text:p>
      <text:p text:style-name="Preformatted_20_Text"># Créer le workflow</text:p>
      <text:p text:style-name="Preformatted_20_Text">nano .github/workflows/build_windows.yml</text:p>
      <text:p text:style-name="Preformatted_20_Text"/>
      <text:p text:style-name="Preformatted_20_Text"># Pousser</text:p>
      <text:p text:style-name="Preformatted_20_Text">git add .github/workflows/build_windows.yml</text:p>
      <text:p text:style-name="Preformatted_20_Text">git commit -m "Ajout compilation Windows"</text:p>
      <text:p text:style-name="P1">git push origin main</text:p>
      <text:h text:style-name="Heading_20_3" text:outline-level="3">Compilation iOS</text:h>
      <text:p text:style-name="Text_20_body">bash</text:p>
      <text:p text:style-name="Preformatted_20_Text"># Créer le workflow</text:p>
      <text:p text:style-name="Preformatted_20_Text">nano .github/workflows/build_ios.yml</text:p>
      <text:p text:style-name="Preformatted_20_Text"/>
      <text:p text:style-name="Preformatted_20_Text"># Pousser</text:p>
      <text:p text:style-name="Preformatted_20_Text">git add .github/workflows/build_ios.yml</text:p>
      <text:p text:style-name="Preformatted_20_Text">git commit -m "Ajout compilation iOS"</text:p>
      <text:p text:style-name="P1">git push origin main</text:p>
      <text:h text:style-name="Heading_20_3" text:outline-level="3">Mise à jour de la page</text:h>
      <text:p text:style-name="Text_20_body">bash</text:p>
      <text:p text:style-name="Preformatted_20_Text"># Modifier</text:p>
      <text:p text:style-name="Preformatted_20_Text">nano docs/index.html</text:p>
      <text:p text:style-name="Preformatted_20_Text"/>
      <text:p text:style-name="Preformatted_20_Text"># Pousser</text:p>
      <text:p text:style-name="Preformatted_20_Text">git add docs/index.html</text:p>
      <text:p text:style-name="Preformatted_20_Text">git commit -m "Mise à jour page"</text:p>
      <text:p text:style-name="P1">git push origin main</text:p>
      <text:h text:style-name="Heading_20_3" text:outline-level="3">Nettoyage complet</text:h>
      <text:p text:style-name="Text_20_body">bash</text:p>
      <text:p text:style-name="Preformatted_20_Text">flutter clean</text:p>
      <text:p text:style-name="Preformatted_20_Text">rm -rf build/</text:p>
      <text:p text:style-name="Preformatted_20_Text">rm -rf .dart_tool/</text:p>
      <text:p text:style-name="P1">flutter pub get</text:p>
      <text:p text:style-name="Horizontal_20_Line"/>
      <text:h text:style-name="Heading_20_2" text:outline-level="2"><text:soft-page-break/>🎯 LIENS UTILE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Service</text:p>
            </table:table-cell>
            <table:table-cell table:style-name="Tableau1.A1" office:value-type="string">
              <text:p text:style-name="Table_20_Heading">Lie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Dépôt</text:span></text:p>
          </table:table-cell>
          <table:table-cell table:style-name="Tableau1.A1" office:value-type="string">
            <text:p text:style-name="Table_20_Contents"><text:a xlink:type="simple" xlink:href="https://github.com/escathadeveloppeur/escaschool" office:target-frame-name="_blank" xlink:show="new" text:style-name="Internet_20_link" text:visited-style-name="Visited_20_Internet_20_Link">https://github.com/escathadeveloppeur/escaschool</text:a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ctions</text:span></text:p>
          </table:table-cell>
          <table:table-cell table:style-name="Tableau1.A1" office:value-type="string">
            <text:p text:style-name="Table_20_Contents"><text:a xlink:type="simple" xlink:href="https://github.com/escathadeveloppeur/escaschool/actions" office:target-frame-name="_blank" xlink:show="new" text:style-name="Internet_20_link" text:visited-style-name="Visited_20_Internet_20_Link">https://github.com/escathadeveloppeur/escaschool/actions</text:a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leases</text:span></text:p>
          </table:table-cell>
          <table:table-cell table:style-name="Tableau1.A1" office:value-type="string">
            <text:p text:style-name="Table_20_Contents"><text:a xlink:type="simple" xlink:href="https://github.com/escathadeveloppeur/escaschool/releases" office:target-frame-name="_blank" xlink:show="new" text:style-name="Internet_20_link" text:visited-style-name="Visited_20_Internet_20_Link">https://github.com/escathadeveloppeur/escaschool/releases</text:a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ite web</text:span></text:p>
          </table:table-cell>
          <table:table-cell table:style-name="Tableau1.A1" office:value-type="string">
            <text:p text:style-name="Table_20_Contents"><text:a xlink:type="simple" xlink:href="https://escathadeveloppeur.github.io/escaschool/" office:target-frame-name="_blank" xlink:show="new" text:style-name="Internet_20_link" text:visited-style-name="Visited_20_Internet_20_Link">https://escathadeveloppeur.github.io/escaschool/</text:a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isual C++</text:span></text:p>
          </table:table-cell>
          <table:table-cell table:style-name="Tableau1.A1" office:value-type="string">
            <text:p text:style-name="Table_20_Contents"><text:a xlink:type="simple" xlink:href="https://aka.ms/vs/17/release/vc_redist.x64.exe" office:target-frame-name="_blank" xlink:show="new" text:style-name="Internet_20_link" text:visited-style-name="Visited_20_Internet_20_Link">https://aka.ms/vs/17/release/vc_redist.x64.exe</text:a></text:p>
          </table:table-cell>
        </table:table-row>
      </table:table>
      <text:p text:style-name="Horizontal_20_Line"/>
      <text:p text:style-name="Text_20_body"><text:span text:style-name="Strong_20_Emphasis">📝 Note :</text:span> Garde ce guide dans un dossier sécurisé (ex: <text:span text:style-name="Source_20_Text">~/documents/guide_compilation.md</text:span>) pour t'y référer à tout moment !</text:p>
      <text:p text:style-name="Text_20_body"><text:span text:style-name="Strong_20_Emphasis">Bonne compilation !</text:span> 🚀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7:02:58.418147135</meta:creation-date>
    <dc:date>2026-06-22T17:05:19.314853705</dc:date>
    <meta:editing-duration>PT2M21S</meta:editing-duration>
    <meta:editing-cycles>1</meta:editing-cycles>
    <meta:document-statistic meta:table-count="1" meta:image-count="0" meta:object-count="0" meta:page-count="9" meta:paragraph-count="331" meta:word-count="1119" meta:character-count="8928" meta:non-whitespace-character-count="7518"/>
    <meta:generator>LibreOffice/7.3.7.2$Linux_X86_64 LibreOffice_project/30$Build-2</meta:generator>
  </office:meta>
</office:document-meta>
</file>